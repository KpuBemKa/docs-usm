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53B0000029BE6B83B9D.png" manifest:media-type="image/png"/>
  <manifest:file-entry manifest:full-path="Pictures/1000000100000594000004055B8052EB.png" manifest:media-type="image/png"/>
  <manifest:file-entry manifest:full-path="Pictures/10000000000007AC00000516E9153E93.png" manifest:media-type="image/png"/>
  <manifest:file-entry manifest:full-path="Pictures/10000001000004A9000003610D3690E7.png" manifest:media-type="image/png"/>
  <manifest:file-entry manifest:full-path="Pictures/10000001000003450000030F769B8A48.png" manifest:media-type="image/png"/>
  <manifest:file-entry manifest:full-path="Pictures/1000000100000311000002EEBB15290A.png" manifest:media-type="image/png"/>
  <manifest:file-entry manifest:full-path="Pictures/10000001000002860000020E47F4A7CE.png" manifest:media-type="image/png"/>
  <manifest:file-entry manifest:full-path="Pictures/1004F6E6000042C40000365D2B4E76E5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modern" style:font-pitch="fixed"/>
    <style:font-face style:name="Fira Code Light" svg:font-family="'Fira Code Light'" style:font-pitch="fixed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1" svg:font-family="'Noto Sans'" style:font-family-generic="swiss"/>
    <style:font-face style:name="OpenSymbol" svg:font-family="OpenSymbol, 'Arial Unicode MS'" style:font-charset="x-symbol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solid" svg:stroke-width="0.053cm" svg:stroke-color="#2c3e50" draw:marker-start-width="0.284cm" draw:marker-end-width="0.284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solid" svg:stroke-width="0.035cm" svg:stroke-color="#2c3e50" draw:marker-start-width="0.257cm" draw:marker-end-width="0.2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4.57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5.27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4.857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solid" draw:stroke-dash="Dot" svg:stroke-width="0.035cm" svg:stroke-color="#2c3e50" draw:marker-start-width="0.257cm" draw:marker-end-width="0.257cm" svg:stroke-linecap="butt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5.37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3.868cm" loext:decorative="false"/>
      <style:paragraph-properties style:writing-mode="lr-tb"/>
    </style:style>
    <style:style style:name="pr1" style:family="presentation" style:parent-style-name="Midnightblue1-title">
      <style:graphic-properties fo:min-height="4.612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237cm" loext:decorative="false"/>
      <style:paragraph-properties style:writing-mode="lr-tb"/>
    </style:style>
    <style:style style:name="pr3" style:family="presentation" style:parent-style-name="Midnightblue1-subtitle" style:list-style-name="L1">
      <style:graphic-properties draw:fill-color="#ffffff" draw:textarea-horizontal-align="center" draw:textarea-vertical-align="top" fo:min-height="2.519cm" loext:decorative="false"/>
      <style:paragraph-properties style:writing-mode="lr-tb"/>
    </style:style>
    <style:style style:name="pr4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Midnightblue-title">
      <style:graphic-properties fo:min-height="0.101cm" loext:decorative="false"/>
      <style:paragraph-properties style:writing-mode="lr-tb"/>
    </style:style>
    <style:style style:name="pr6" style:family="presentation" style:parent-style-name="Midnightblue-outline1">
      <style:graphic-properties fo:min-height="0.101cm" loext:decorative="false"/>
      <style:paragraph-properties style:writing-mode="lr-tb"/>
    </style:style>
    <style:style style:name="pr7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8" style:family="presentation" style:parent-style-name="Midnightblue-title">
      <style:graphic-properties fo:min-height="1.998cm" loext:decorative="false"/>
      <style:paragraph-properties style:writing-mode="lr-tb"/>
    </style:style>
    <style:style style:name="pr9" style:family="presentation" style:parent-style-name="Midnightblue-outline1">
      <style:graphic-properties fo:min-height="10.501cm" loext:decorative="false"/>
      <style:paragraph-properties style:writing-mode="lr-tb"/>
    </style:style>
    <style:style style:name="pr10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co1" style:family="table-column">
      <style:table-column-properties style:column-width="3.576cm" style:use-optimal-column-width="false"/>
    </style:style>
    <style:style style:name="co2" style:family="table-column">
      <style:table-column-properties style:column-width="4.994cm" style:use-optimal-column-width="false"/>
    </style:style>
    <style:style style:name="co3" style:family="table-column">
      <style:table-column-properties style:column-width="2.149cm" style:use-optimal-column-width="false"/>
    </style:style>
    <style:style style:name="co4" style:family="table-column">
      <style:table-column-properties style:column-width="1.812cm" style:use-optimal-column-width="false"/>
    </style:style>
    <style:style style:name="ro1" style:family="table-row">
      <style:table-row-properties style:row-height="1.44cm" style:use-optimal-row-height="false"/>
    </style:style>
    <style:style style:name="ro2" style:family="table-row">
      <style:table-row-properties style:row-height="0cm" style:use-optimal-row-height="true"/>
    </style:style>
    <style:style style:name="ro3" style:family="table-row">
      <style:table-row-properties style:row-height="0.519cm" style:use-optimal-row-height="false"/>
    </style:style>
    <style:style style:name="ce1" style:family="table-cell">
      <style:paragraph-properties fo:margin-left="0cm" fo:margin-right="0cm" fo:margin-top="0.057cm" fo:margin-bottom="0.057cm" fo:text-align="center" fo:text-indent="0cm"/>
      <style:text-properties fo:font-size="10pt" fo:font-style="italic" style:font-size-asian="10pt" style:font-style-asian="italic" style:font-size-complex="10pt" style:font-style-complex="italic"/>
    </style:style>
    <style:style style:name="ce2" style:family="table-cell">
      <style:paragraph-properties fo:margin-left="0.113cm" fo:margin-right="0cm" fo:margin-top="0.057cm" fo:margin-bottom="0.057cm" fo:text-indent="0cm"/>
      <style:text-properties fo:font-size="10pt" style:font-size-asian="10pt" style:font-size-complex="10pt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4cm" fo:margin-bottom="0.4cm" fo:text-align="center" fo:text-indent="0cm" style:text-autospace="ideograph-alpha" style:punctuation-wrap="hanging"/>
    </style:style>
    <style:style style:name="P3" style:family="paragraph">
      <loext:graphic-properties draw:fill-color="#ffffff"/>
      <style:paragraph-properties fo:margin-left="0cm" fo:margin-right="0cm" fo:margin-top="0.4cm" fo:margin-bottom="0.4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margin-top="0cm" fo:margin-bottom="0.37cm"/>
      <style:text-properties fo:hyphenate="false" loext:hyphenation-no-caps="false" loext:hyphenation-no-last-word="false"/>
    </style:style>
    <style:style style:name="P6" style:family="paragraph">
      <style:paragraph-properties fo:margin-top="0cm" fo:margin-bottom="0.37cm"/>
      <style:text-properties fo:font-weight="normal" style:font-weight-asian="normal" style:font-weight-complex="normal" fo:hyphenate="false" loext:hyphenation-no-caps="false" loext:hyphenation-no-last-word="false"/>
    </style:style>
    <style:style style:name="P7" style:family="paragraph">
      <style:paragraph-properties fo:margin-left="0cm" fo:margin-right="0cm" fo:margin-top="0cm" fo:margin-bottom="0cm" fo:line-height="100%" fo:text-indent="0cm" style:text-autospace="ideograph-alpha" style:punctuation-wrap="hanging"/>
    </style:style>
    <style:style style:name="P8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9" style:family="paragraph">
      <style:paragraph-properties fo:margin-left="0cm" fo:margin-right="0cm" fo:margin-top="0cm" fo:margin-bottom="0cm" fo:line-height="100%" fo:text-indent="0cm" style:text-autospace="ideograph-alpha" style:punctuation-wrap="hanging"/>
      <style:text-properties fo:font-weight="normal" style:font-weight-asian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</style:style>
    <style:style style:name="P14" style:family="paragraph">
      <style:paragraph-properties fo:line-height="100%"/>
    </style:style>
    <style:style style:name="P15" style:family="paragraph">
      <style:paragraph-properties fo:margin-left="0cm" fo:margin-right="0cm" fo:margin-top="0.057cm" fo:margin-bottom="0.057cm" fo:text-align="center" fo:text-indent="0cm"/>
      <style:text-properties fo:font-size="10pt" fo:font-style="italic" style:font-size-asian="10pt" style:font-style-asian="italic" style:font-size-complex="10pt" style:font-style-complex="italic"/>
    </style:style>
    <style:style style:name="P16" style:family="paragraph">
      <style:paragraph-properties fo:margin-left="0.113cm" fo:margin-right="0cm" fo:margin-top="0.057cm" fo:margin-bottom="0.057cm" fo:text-indent="0cm"/>
      <style:text-properties style:font-size-asian="10pt" style:font-size-complex="10pt"/>
    </style:style>
    <style:style style:name="P17" style:family="paragraph">
      <style:paragraph-properties fo:margin-left="0.113cm" fo:margin-right="0cm" fo:margin-top="0.057cm" fo:margin-bottom="0.057cm" fo:text-indent="0cm"/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Courier New" fo:font-weight="bold" style:font-weight-asian="bold" style:font-weight-complex="bold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fo:font-size="20pt" fo:font-style="normal" fo:text-shadow="none" style:text-underline-style="solid" style:text-underline-width="auto" style:text-underline-color="font-color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c3e50" loext:opacity="100%" style:text-outline="false" style:text-line-through-style="none" style:text-line-through-type="none" fo:font-size="20pt" fo:font-style="italic" fo:text-shadow="none" style:text-underline-style="solid" style:text-underline-width="auto" style:text-underline-color="font-color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2c3e50" loext:opacity="100%" style:text-outline="false" style:text-line-through-style="none" style:text-line-through-type="none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font-size="10pt" fo:font-style="italic" style:font-size-asian="10pt" style:font-style-asian="italic" style:font-size-complex="10pt" style:font-style-complex="italic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-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-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-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-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-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-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-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-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-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612cm" svg:x="1cm" svg:y="4.888cm" presentation:class="title" presentation:user-transformed="true">
          <draw:text-box>
            <text:p>Infrastructură de măsurare pentru compararea configurațiilor LLM într-un <text:span text:style-name="T1">pipeline</text:span> multi-agent</text:p>
          </draw:text-box>
        </draw:frame>
        <draw:frame presentation:style-name="pr2" draw:text-style-name="P1" draw:layer="layout" svg:width="26cm" svg:height="4.237cm" svg:x="1cm" svg:y="10.819cm" presentation:class="subtitle" presentation:user-transformed="true">
          <draw:text-box>
            <text:p>Penzari Marc</text:p>
            <text:p>TI231</text:p>
            <text:p/>
            <text:p>2026</text:p>
          </draw:text-box>
        </draw:frame>
        <draw:frame presentation:style-name="pr3" draw:text-style-name="P3" draw:layer="layout" svg:width="26cm" svg:height="2.519cm" svg:x="1cm" svg:y="0.481cm">
          <draw:text-box>
            <text:p text:style-name="P2"><text:span text:style-name="T2">Universit</text:span><text:span text:style-name="T2">atea de </text:span><text:span text:style-name="T2">Stat din </text:span><text:span text:style-name="T2">Moldova</text:span></text:p>
            <text:p text:style-name="P2"><text:span text:style-name="T2">Facultate</text:span><text:span text:style-name="T2">a de </text:span><text:span text:style-name="T2">Fizică și </text:span><text:span text:style-name="T2">Ingineri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cm" svg:x="1cm" svg:y="0.627cm" presentation:class="title" presentation:user-transformed="true">
          <draw:text-box>
            <text:p>Context și problemă</text:p>
          </draw:text-box>
        </draw:frame>
        <draw:frame presentation:style-name="pr6" draw:text-style-name="P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3">Revânzarea în e-commerce</text:span><text:span text:style-name="T4">: extragere -&gt; rescriere -&gt; imagini -&gt; preț -&gt; publicare;</text:span></text:p>
              </text:list-item>
              <text:list-item>
                <text:p><text:span text:style-name="T3">LLM-urile</text:span><text:span text:style-name="T4"> fac automatizarea robustă: citesc pagina ca un om, produc ieșire structurată;</text:span></text:p>
              </text:list-item>
              <text:list-item>
                <text:p><text:span text:style-name="T3">Întrebarea principală</text:span><text:span text:style-name="T4">: dintre numeroasele LLM-uri (preț, prompt, implementare diferite), cum se compară pe o sarcină fixă și reproductibilă?</text:span></text:p>
              </text:list-item>
              <text:list-item>
                <text:p><text:span text:style-name="T5">Două</text:span><text:span text:style-name="T3"> livrabile</text:span><text:span text:style-name="T4">: un flux multi-agent funcțional + o infrastructură de măsurare în jurul lui.</text:span></text:p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7" draw:text-style-name="P1" draw:layer="layout" svg:width="17cm" svg:height="14cm" svg:x="2cm" svg:y="13cm" presentation:class="notes" presentation:user-transformed="true">
            <draw:text-box>
              <text:p>- Revânzarea e obositoarea și ea mult timp. Etapele enumerate sunt manuale și eau mult timp;</text:p>
              <text:p>- Spre deosebire de extractori rigizi bazați pe script-uri, ...;</text:p>
              <text:p>- Întrebarea principală a proiectului: ...;</text:p>
              <text:p>- <text:s/>...;</text:p>
            </draw:text-box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Fundamente tehnice</text:p>
          </draw:text-box>
        </draw:frame>
        <draw:frame presentation:style-name="pr9" draw:text-style-name="P4" draw:layer="layout" svg:width="26cm" svg:height="10.5cm" svg:x="1cm" svg:y="4.125cm" presentation:class="outline">
          <draw:text-box>
            <text:list text:style-name="L2">
              <text:list-item>
                <text:p><text:span text:style-name="T3">Sistem multi-agent</text:span><text:span text:style-name="T4">: sarcina spartă în sub-sarcini, fiecare = un agent (un apel LLM cu prompt și contract de I/O);</text:span></text:p>
              </text:list-item>
              <text:list-item>
                <text:p><text:span text:style-name="T3">Renunțare la </text:span><text:span text:style-name="T6">framework</text:span><text:span text:style-name="T3">-uri</text:span><text:span text:style-name="T4">: LangChain / LangGraph / AutoGen -&gt; orchestrator propriu de ~200 linii;</text:span></text:p>
              </text:list-item>
              <text:list-item>
                <text:p><text:span text:style-name="T3">Extragere structurată</text:span><text:span text:style-name="T4">: mod JSON + validare de schemă (Pydantic) cu reîncercare-o-dată la eșec;</text:span></text:p>
              </text:list-item>
              <text:list-item>
                <text:p><text:span text:style-name="T3">Web scraping anti-bot</text:span><text:span text:style-name="T4">: impersonare TLS (curl_cffi), rezervă Playwright, recuperare manuală folosind om-în-buclă;</text:span></text:p>
              </text:list-item>
              <text:list-item>
                <text:p><text:span text:style-name="T3">Interfață asincronă</text:span><text:span text:style-name="T4">: bot Telegram (notificări push pentru rulări lungi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10" draw:text-style-name="P1" draw:layer="layout" svg:width="17cm" svg:height="14cm" svg:x="2cm" svg:y="13cm" presentation:class="notes" presentation:user-transformed="true">
            <draw:text-box>
              <text:p>Idei pe care este bazat proiectul:</text:p>
              <text:p>- Sarcina este spartă în etape realizate de agenți;</text:p>
              <text:p>- Framework scris manual;</text:p>
              <text:p>- Extragerea datelor cu validarea tipurilor;</text:p>
              <text:p>- Traversarea paginilor cu atenuarea boților;</text:p>
            </draw:text-box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Arhitectura sistemului</text:p>
          </draw:text-box>
        </draw:frame>
        <draw:frame presentation:style-name="pr9" draw:text-style-name="P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<text:span text:style-name="T3">Patru servicii care cooperează</text:span><text:span text:style-name="T4">: bot, orchestrator, worker (Python 3.12) + Redis ca broker;</text:span></text:p>
              </text:list-item>
              <text:list-item>
                <text:p><text:span text:style-name="T3">Separare pentru izolarea eșecurilor</text:span><text:span text:style-name="T4">: un apel LLM lent în worker nu blochează botul;</text:span></text:p>
              </text:list-item>
              <text:list-item>
                <text:p><text:span text:style-name="T3">Orchestrator (FastAPI)</text:span><text:span text:style-name="T4">: API REST, ciclul de viață al rulării. Worker (</text:span><text:span text:style-name="T7">arq</text:span><text:span text:style-name="T4">): execută fluxul, înregistrează măsurători;</text:span></text:p>
              </text:list-item>
              <text:list-item>
                <text:p><text:span text:style-name="T4">Stocare:</text:span></text:p>
              </text:list-item>
            </text:list>
            <text:list text:style-name="L4">
              <text:list-item>
                <text:list>
                  <text:list-item>
                    <text:p><text:span text:style-name="T7">runs</text:span><text:span text:style-name="T4">: o linie per rulare (mașină de stări: queued -&gt; running -&gt; awaiting_approval -&gt; published/…);</text:span></text:p>
                  </text:list-item>
                  <text:list-item>
                    <text:p><text:span text:style-name="T7">step_runs</text:span><text:span text:style-name="T4">: o linie per apel agent (model, latență, token-uri, cost, eroare);</text:span></text:p>
                  </text:list-item>
                  <text:list-item>
                    <text:p><text:span text:style-name="T4">Artefacte JSON/imagini pe disc, per rular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10" draw:text-style-name="P1" draw:layer="layout" svg:width="17cm" svg:height="14cm" svg:x="2cm" svg:y="13cm" presentation:class="notes" presentation:user-transformed="true">
            <draw:text-box>
              <text:p>Din ce este compus proiectul:</text:p>
              <text:p>- Patru servicii principale:</text:p>
              <text:p><text:tab/>- bot telegram;</text:p>
              <text:p><text:tab/>- orchestrator: managerul sistemului, interfața de cooperare user-worker;</text:p>
              <text:p><text:tab/>- worker: serviciul care efectuază lucrul principal;</text:p>
              <text:p><text:tab/>- Redis: sistemul de queue;</text:p>
              <text:p>- Separarea pe servicii permite rularea independentă și izolarea eșecurilor;</text:p>
              <text:p>- Orchestratorul este bazat pe FastAPI, observă ciclul de viață; Worker-ul execută job-ul;</text:p>
              <text:p>- Datele stocate be disc: ...;</text:p>
            </draw:text-box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<text:span text:style-name="T1">Pipeli</text:span><text:span text:style-name="T1">ne</text:span>-ul</text:p>
          </draw:text-box>
        </draw:frame>
        <draw:frame presentation:style-name="pr9" draw:text-style-name="P9" draw:layer="layout" svg:width="8.5cm" svg:height="6.375cm" svg:x="1cm" svg:y="4.125cm" presentation:class="outline" presentation:user-transformed="true">
          <draw:text-box>
            <text:list text:style-name="L2">
              <text:list-item>
                <text:p text:style-name="P7"><text:span text:style-name="T8">Șase agenți secvențiali</text:span></text:p>
                <text:p text:style-name="P7"><text:span text:style-name="T8">(3 folosesc LLM):</text:span></text:p>
                <text:list>
                  <text:list-item>
                    <text:p text:style-name="P8"><text:span text:style-name="T9">Scraper</text:span><text:span text:style-name="T10">;</text:span></text:p>
                  </text:list-item>
                  <text:list-item>
                    <text:p text:style-name="P8"><text:span text:style-name="T11">Extractor</text:span><text:span text:style-name="T12">;</text:span></text:p>
                  </text:list-item>
                  <text:list-item>
                    <text:p text:style-name="P8"><text:span text:style-name="T10">Selector imagini;</text:span></text:p>
                  </text:list-item>
                  <text:list-item>
                    <text:p text:style-name="P8"><text:span text:style-name="T11">Rescriitor;</text:span></text:p>
                  </text:list-item>
                  <text:list-item>
                    <text:p text:style-name="P8"><text:span text:style-name="T11">Evaluator preț</text:span><text:span text:style-name="T10">;</text:span></text:p>
                  </text:list-item>
                  <text:list-item>
                    <text:p text:style-name="P8"><text:span text:style-name="T10">Compozitor calitate;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3.5cm" svg:height="10.992cm" svg:x="12cm" svg:y="3.608cm">
          <draw:image xlink:href="Pictures/1004F6E6000042C40000365D2B4E76E5.svg" xlink:type="simple" xlink:show="embed" xlink:actuate="onLoad" draw:mime-type="image/svg+xml">
            <text:p/>
          </draw:image>
          <draw:image xlink:href="Pictures/10000001000002860000020E47F4A7CE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0" draw:text-style-name="P1" draw:layer="layout" svg:width="17cm" svg:height="14cm" svg:x="2cm" svg:y="13cm" presentation:class="notes" presentation:user-transformed="true">
            <draw:text-box>
              <text:p>Din ce este compus pipeline-ul:</text:p>
              <text:p>- Worker-ul:</text:p>
              <text:p><text:tab/>- Rulează job-urile, salvează rezultatele pe disc în: SQLite + fișiere pe disc (rezulatatele OpenRouter, site cache);</text:p>
              <text:p><text:tab/>- Job-urile sunt executate secvențial de 6 agenți. Agenții LLM sunt subliniați;</text:p>
              <text:p>- Botul telegram:</text:p>
              <text:p><text:tab/>- Operează cu orchestractorul prin HTTP API + își salvează datele sale pe disc – bot_configs.json (configurațiile posibile + cele active);</text:p>
              <text:p>- Orchestratorul:</text:p>
              <text:p><text:span text:style-name="T13"><text:tab/></text:span><text:span text:style-name="T13">- </text:span><text:span text:style-name="T13">Expune </text:span><text:span text:style-name="T13">HTTP </text:span><text:span text:style-name="T13">API </text:span><text:span text:style-name="T13">CRUD </text:span><text:span text:style-name="T13">(Create </text:span><text:span text:style-name="T13">Read </text:span><text:span text:style-name="T13">Update </text:span><text:span text:style-name="T13">Delete) </text:span><text:span text:style-name="T13">a job-</text:span><text:span text:style-name="T13">urilor, </text:span><text:span text:style-name="T13">numai </text:span><text:span text:style-name="T13">că fără </text:span><text:span text:style-name="T13">Delete;</text:span></text:p>
              <text:p><text:span text:style-name="T13"><text:tab/></text:span><text:span text:style-name="T13">- </text:span><text:span text:style-name="T13">Botul </text:span><text:span text:style-name="T13">telegra</text:span><text:span text:style-name="T13">m pune </text:span><text:span text:style-name="T13">job-</text:span><text:span text:style-name="T13">urile în </text:span><text:span text:style-name="T13">queue </text:span><text:span text:style-name="T13">prin </text:span><text:span text:style-name="T13">API, </text:span><text:span text:style-name="T13">apoi le </text:span><text:span text:style-name="T13">sondea</text:span><text:span text:style-name="T13">ză și </text:span><text:span text:style-name="T13">așteapt</text:span><text:span text:style-name="T13">ă </text:span><text:span text:style-name="T13">rezulatu</text:span><text:span text:style-name="T13">l prin </text:span><text:span text:style-name="T13">API;</text:span></text:p>
              <text:p><text:span text:style-name="T13"><text:tab/></text:span><text:span text:style-name="T13">- </text:span><text:span text:style-name="T13">Joburile </text:span><text:span text:style-name="T13">noi sunt </text:span><text:span text:style-name="T13">puse în </text:span><text:span text:style-name="T13">Redis </text:span><text:span text:style-name="T13">queue, </text:span><text:span text:style-name="T13">de unde </text:span><text:span text:style-name="T13">le preia </text:span><text:span text:style-name="T13">worker-</text:span><text:span text:style-name="T13">ul;</text:span></text:p>
            </draw:text-box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Configurarea experimentului</text:p>
          </draw:text-box>
        </draw:frame>
        <draw:frame presentation:style-name="pr9" draw:text-style-name="P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1"><text:span text:style-name="T5">9 configurații</text:span><text:span text:style-name="T14">: Claude, DeepSeek, </text:span><text:span text:style-name="T4">GPT, Gemini, Gemma, Llama;</text:span></text:p>
              </text:list-item>
              <text:list-item>
                <text:p><text:span text:style-name="T4">Matrice de </text:span><text:span text:style-name="T3">189 de rulări</text:span><text:span text:style-name="T4"> = 9 configurații × 7 anunțuri eBay × 3 repetări.</text:span></text:p>
              </text:list-item>
              <text:list-item>
                <text:p><text:span text:style-name="T3">HTML din cache</text:span><text:span text:style-name="T4">: fiecare URL descărcat o singură dată;</text:span></text:p>
              </text:list-item>
              <text:list-item>
                <text:p><text:span text:style-name="T3">Persistență la nivel de apel</text:span><text:span text:style-name="T4">: fiecare apel LLM salvat pe disc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0" draw:text-style-name="P1" draw:layer="layout" svg:width="17cm" svg:height="14cm" svg:x="2cm" svg:y="13cm" presentation:class="notes" presentation:user-transformed="true">
            <draw:text-box>
              <text:p>Cum au fost rulate experimentele:</text:p>
              <text:p><text:span text:style-name="T13">- 9 </text:span><text:span text:style-name="T13">configu</text:span><text:span text:style-name="T13">rații: </text:span><text:span text:style-name="T13">2xClaud</text:span><text:span text:style-name="T13">e, </text:span><text:span text:style-name="T13">2xDeep</text:span><text:span text:style-name="T13">Seek, </text:span><text:span text:style-name="T13">2xGPT, </text:span><text:span text:style-name="T13">Gemini, </text:span><text:span text:style-name="T13">Gemma</text:span><text:span text:style-name="T13">, Llama;</text:span></text:p>
              <text:p><text:span text:style-name="T13">- Rulări: 9 </text:span><text:span text:style-name="T13">configu</text:span><text:span text:style-name="T13">rații, 7 </text:span><text:span text:style-name="T13">link-uri, </text:span><text:span text:style-name="T13">3 </text:span><text:span text:style-name="T13">repetări </text:span><text:span text:style-name="T13">per link;</text:span></text:p>
              <text:p><text:span text:style-name="T13"/></text:p>
            </draw:text-box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Rezultate cantitative</text:p>
          </draw:text-box>
        </draw:frame>
        <draw:frame draw:style-name="gr3" draw:text-style-name="P10" draw:layer="layout" svg:width="11.124cm" svg:height="10.406cm" svg:x="15.376cm" svg:y="3.594cm">
          <draw:image xlink:href="Pictures/10000001000003450000030F769B8A48.png" xlink:type="simple" xlink:show="embed" xlink:actuate="onLoad" draw:mime-type="image/png">
            <text:p/>
          </draw:image>
        </draw:frame>
        <draw:frame draw:style-name="gr3" draw:text-style-name="P10" draw:layer="layout" svg:width="10.983cm" svg:height="10.494cm" svg:x="1.5cm" svg:y="3.6cm">
          <draw:image xlink:href="Pictures/1000000100000311000002EEBB15290A.png" xlink:type="simple" xlink:show="embed" xlink:actuate="onLoad" draw:mime-type="image/png">
            <text:p/>
          </draw:image>
        </draw:frame>
        <draw:frame draw:style-name="gr4" draw:text-style-name="P12" draw:layer="layout" svg:width="5.117cm" svg:height="0.924cm" svg:x="18.376cm" svg:y="13.978cm">
          <draw:text-box>
            <text:p><text:span text:style-name="T15">Ieșire/intrare </text:span><text:span text:style-name="T15">tokeni</text:span></text:p>
          </draw:text-box>
        </draw:frame>
        <draw:frame draw:style-name="gr5" draw:text-style-name="P12" draw:layer="layout" svg:width="5.819cm" svg:height="0.924cm" svg:x="4.71cm" svg:y="14.092cm">
          <draw:text-box>
            <text:p><text:span text:style-name="T15">Ieșire/intrare </text:span><text:span text:style-name="T15">caracte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0" draw:text-style-name="P1" draw:layer="layout" svg:width="17cm" svg:height="14cm" svg:x="2cm" svg:y="13cm" presentation:class="notes" presentation:user-transformed="true">
            <draw:text-box>
              <text:p>- Cantitatea ieșirii/intrării promp-utilor sunt calculate în token-uri;</text:p>
              <text:p>- 1 token != 1 caracter;</text:p>
              <text:p>- Numărul de caractere ieșire/intrare variază cu 44%;</text:p>
              <text:p>- Numărul de token-uri variază cu 1200%;</text:p>
              <text:p>- Cauza: tokenizator. Tokenizatorul transformă cuvintele în numere cu care rulează LLM-urile, apoi înapoi în cuvinte;</text:p>
              <text:p>- Rezultat: Fiecare LLM interpretează cuvintele în felul său -&gt; Unele LLM-uri operează cu cantități diferite de token-uri;</text:p>
            </draw:text-box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Latența și eșecuri</text:p>
          </draw:text-box>
        </draw:frame>
        <draw:frame draw:style-name="gr3" draw:text-style-name="P10" draw:layer="layout" svg:width="13.102cm" svg:height="9.5cm" svg:x="0.725cm" svg:y="4cm">
          <draw:image xlink:href="Pictures/10000001000004A9000003610D3690E7.png" xlink:type="simple" xlink:show="embed" xlink:actuate="onLoad" draw:mime-type="image/png">
            <text:p/>
          </draw:image>
        </draw:frame>
        <draw:frame draw:style-name="gr6" draw:text-style-name="P12" draw:layer="layout" svg:width="5.399cm" svg:height="0.924cm" svg:x="4cm" svg:y="13.598cm">
          <draw:text-box>
            <text:p><text:span text:style-name="T15">Numărul de </text:span><text:span text:style-name="T15">încercări</text:span></text:p>
          </draw:text-box>
        </draw:frame>
        <draw:frame draw:style-name="gr7" draw:text-style-name="P13" draw:layer="layout" svg:width="11.919cm" svg:height="7.902cm" svg:x="14.5cm" svg:y="4cm">
          <draw:image xlink:href="Pictures/10000000000007AC00000516E9153E93.png" xlink:type="simple" xlink:show="embed" xlink:actuate="onLoad" draw:mime-type="image/png">
            <text:p/>
          </draw:image>
        </draw:frame>
        <draw:frame draw:style-name="gr6" draw:text-style-name="P12" draw:layer="layout" svg:width="5.357cm" svg:height="0.924cm" svg:x="18cm" svg:y="12.076cm">
          <draw:text-box>
            <text:p><text:span text:style-name="T15">Distribuția </text:span><text:span text:style-name="T15">latențe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10" draw:text-style-name="P1" draw:layer="layout" svg:width="17cm" svg:height="14cm" svg:x="2cm" svg:y="13cm" presentation:class="notes" presentation:user-transformed="true">
            <draw:text-box>
              <text:p>Trei tipuri de eșecuri:</text:p>
              <text:p><text:tab/>- Eșuat-apoi-reușit: ex.: apelul LLM a eșuat prima dată, a reușit a doua dată (dacă un apel LLM eșuază prima dată, al doilea apel include și eroarea eșecului);</text:p>
              <text:p><text:tab/>- Eșec dur: ambele apeluri au eșuat;</text:p>
              <text:p><text:tab/>- Eșec moale: specific agentului `pricer`. Ambele eșecuri LLM nu generează o excepție, dar marchează că au fost eșuate;</text:p>
              <text:p>S-au observat 0 eșecuri dure și moale, 2 reîncercări. Rezultat: LLM-urile moderne se adveră foarte bine disciplinei JSON;</text:p>
              <text:p/>
              <text:p>Latența:</text:p>
              <text:p>- În acest caz, latența este măsurată și pentru modelele LLM, și pentru provideri diferiți;</text:p>
            </draw:text-box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Scoruri prețului</text:p>
          </draw:text-box>
        </draw:frame>
        <draw:frame draw:style-name="gr3" draw:text-style-name="P10" draw:layer="layout" svg:width="14.01cm" svg:height="10.096cm" svg:x="13cm" svg:y="3.925cm">
          <draw:image xlink:href="Pictures/1000000100000594000004055B8052EB.png" xlink:type="simple" xlink:show="embed" xlink:actuate="onLoad" draw:mime-type="image/png">
            <text:p/>
          </draw:image>
        </draw:frame>
        <draw:frame presentation:style-name="pr9" draw:text-style-name="P9" draw:layer="layout" svg:width="11cm" svg:height="9.1cm" svg:x="1cm" svg:y="4.4cm" presentation:class="outline" presentation:user-transformed="true">
          <draw:text-box>
            <text:list text:style-name="L2">
              <text:list-item>
                <text:p text:style-name="P7"><text:span text:style-name="T16">Dispoziția de preț</text:span><text:span text:style-name="T8">: scoruri pe 5 dimensiuni (-5..+5):</text:span></text:p>
                <text:list>
                  <text:list-item>
                    <text:p text:style-name="P14"><text:span text:style-name="T17">Lux;</text:span></text:p>
                  </text:list-item>
                  <text:list-item>
                    <text:p text:style-name="P14"><text:span text:style-name="T17">Atractivitatea comercială;</text:span></text:p>
                  </text:list-item>
                  <text:list-item>
                    <text:p text:style-name="P14"><text:span text:style-name="T17">Brand;</text:span></text:p>
                  </text:list-item>
                  <text:list-item>
                    <text:p text:style-name="P14"><text:span text:style-name="T17">Raritate;</text:span></text:p>
                  </text:list-item>
                  <text:list-item>
                    <text:p text:style-name="P14"><text:span text:style-name="T17">Cerere pe piață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0" draw:text-style-name="P1" draw:layer="layout" svg:width="17cm" svg:height="14cm" svg:x="2cm" svg:y="13cm" presentation:class="notes" presentation:user-transformed="true">
            <draw:text-box>
              <text:p>- Agentul `pricer` crează un preț nou pentru produs;</text:p>
              <text:p>- Prețul nou nu reflectă costurile de livrare și import;</text:p>
              <text:p>- Reflectă cât de mult prețul poate fi ridicat. Așa numit „vibe-pricing”;</text:p>
              <text:p/>
              <text:p>El este cerut să noteze 5 parametri în intervalul [-5; +5];</text:p>
              <text:p>În general LLM-urile preferă să ridice prețul;</text:p>
              <text:p>Cel puțin, poate depinde de promptul folosit;</text:p>
            </draw:text-box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Prețurile de rulare</text:p>
          </draw:text-box>
        </draw:frame>
        <draw:frame draw:style-name="gr3" draw:text-style-name="P10" draw:layer="layout" svg:width="12.798cm" svg:height="6.375cm" svg:x="14.302cm" svg:y="4.125cm">
          <draw:image xlink:href="Pictures/100000010000053B0000029BE6B83B9D.png" xlink:type="simple" xlink:show="embed" xlink:actuate="onLoad" draw:mime-type="image/png">
            <text:p/>
          </draw:image>
        </draw:frame>
        <draw:frame draw:style-name="gr8" draw:layer="layout" svg:width="12.53cm" svg:height="7.976cm" svg:x="0.898cm" svg:y="4.0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5"><text:span text:style-name="T18">Configurație</text:span></text:p>
              </table:table-cell>
              <table:table-cell>
                <text:p text:style-name="P15"><text:span text:style-name="T18">Identificatorul</text:span></text:p>
                <text:p text:style-name="P15"><text:span text:style-name="T18">modelului</text:span></text:p>
              </table:table-cell>
              <table:table-cell>
                <text:p text:style-name="P15"><text:span text:style-name="T18">Prețul-intrare</text:span></text:p>
                <text:p text:style-name="P15"><text:span text:style-name="T18">$/1M</text:span></text:p>
              </table:table-cell>
              <table:table-cell>
                <text:p text:style-name="P15"><text:span text:style-name="T18">Prețul-ieșire</text:span></text:p>
                <text:p text:style-name="P15"><text:span text:style-name="T18">$/1M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19">claude-3-haiku</text:span></text:p>
              </table:table-cell>
              <table:table-cell>
                <text:p text:style-name="P17"><text:span text:style-name="T19">anthropic/claude-3-haiku</text:span></text:p>
              </table:table-cell>
              <table:table-cell>
                <text:p text:style-name="P17"><text:span text:style-name="T19">$0,25</text:span></text:p>
              </table:table-cell>
              <table:table-cell>
                <text:p text:style-name="P17"><text:span text:style-name="T19">$1,25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9">claude-3.5-haiku</text:span></text:p>
              </table:table-cell>
              <table:table-cell>
                <text:p text:style-name="P17"><text:span text:style-name="T19">anthropic/claude-3.5-haiku</text:span></text:p>
              </table:table-cell>
              <table:table-cell>
                <text:p text:style-name="P17"><text:span text:style-name="T19">$1,00</text:span></text:p>
              </table:table-cell>
              <table:table-cell>
                <text:p text:style-name="P17"><text:span text:style-name="T19">$5,00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9">deepseek-v4-flash</text:span></text:p>
              </table:table-cell>
              <table:table-cell>
                <text:p text:style-name="P17"><text:span text:style-name="T19">deepseek/deepseek-v4-flash</text:span></text:p>
              </table:table-cell>
              <table:table-cell>
                <text:p text:style-name="P17"><text:span text:style-name="T19">$0,10</text:span></text:p>
              </table:table-cell>
              <table:table-cell>
                <text:p text:style-name="P17"><text:span text:style-name="T19">$0,40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9">deepseek-v4-pro</text:span></text:p>
              </table:table-cell>
              <table:table-cell>
                <text:p text:style-name="P17"><text:span text:style-name="T19">deepseek/deepseek-v4-pro</text:span></text:p>
              </table:table-cell>
              <table:table-cell>
                <text:p text:style-name="P17"><text:span text:style-name="T19">$0,27</text:span></text:p>
              </table:table-cell>
              <table:table-cell>
                <text:p text:style-name="P17"><text:span text:style-name="T19">$1,10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9">google-gemini-3.1-flash</text:span></text:p>
              </table:table-cell>
              <table:table-cell>
                <text:p text:style-name="P17"><text:span text:style-name="T19">google/gemini-3.1-flash-lite</text:span></text:p>
              </table:table-cell>
              <table:table-cell>
                <text:p text:style-name="P17"><text:span text:style-name="T19">$0,10</text:span></text:p>
              </table:table-cell>
              <table:table-cell>
                <text:p text:style-name="P17"><text:span text:style-name="T19">$0,40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9">google-gemma-4-31b</text:span></text:p>
              </table:table-cell>
              <table:table-cell>
                <text:p text:style-name="P17"><text:span text:style-name="T19">google/gemma-4-31b-it</text:span></text:p>
              </table:table-cell>
              <table:table-cell>
                <text:p text:style-name="P17"><text:span text:style-name="T19">$0,10</text:span></text:p>
              </table:table-cell>
              <table:table-cell>
                <text:p text:style-name="P17"><text:span text:style-name="T19">$0,30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9">gpt-4o-mini</text:span></text:p>
              </table:table-cell>
              <table:table-cell>
                <text:p text:style-name="P17"><text:span text:style-name="T19">openai/gpt-4o-mini</text:span></text:p>
              </table:table-cell>
              <table:table-cell>
                <text:p text:style-name="P17"><text:span text:style-name="T19">$0,15</text:span></text:p>
              </table:table-cell>
              <table:table-cell>
                <text:p text:style-name="P17"><text:span text:style-name="T19">$0,60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9">gpt-5.4-nano</text:span></text:p>
              </table:table-cell>
              <table:table-cell>
                <text:p text:style-name="P17"><text:span text:style-name="T19">openai/gpt-5.4-nano</text:span></text:p>
              </table:table-cell>
              <table:table-cell>
                <text:p text:style-name="P17"><text:span text:style-name="T19">$0,05</text:span></text:p>
              </table:table-cell>
              <table:table-cell>
                <text:p text:style-name="P17"><text:span text:style-name="T19">$0,40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9">llama-3.3-70b</text:span></text:p>
              </table:table-cell>
              <table:table-cell>
                <text:p text:style-name="P17"><text:span text:style-name="T19">meta-llama/llama-3.3-70b-instruct</text:span></text:p>
              </table:table-cell>
              <table:table-cell>
                <text:p text:style-name="P17"><text:span text:style-name="T19">$0,13</text:span></text:p>
              </table:table-cell>
              <table:table-cell>
                <text:p text:style-name="P17"><text:span text:style-name="T19">$0,3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2" draw:layer="layout" svg:width="5.922cm" svg:height="0.924cm" svg:x="4cm" svg:y="12.078cm">
          <draw:text-box>
            <text:p><text:span text:style-name="T15">Prețul per 1M </text:span><text:span text:style-name="T15">token-uri</text:span></text:p>
          </draw:text-box>
        </draw:frame>
        <draw:frame draw:style-name="gr10" draw:text-style-name="P12" draw:layer="layout" svg:width="4.401cm" svg:height="0.924cm" svg:x="18.5cm" svg:y="10.498cm">
          <draw:text-box>
            <text:p><text:span text:style-name="T15">Costul per rula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0" draw:text-style-name="P1" draw:layer="layout" svg:width="17cm" svg:height="14cm" svg:x="2cm" svg:y="13cm" presentation:class="notes" presentation:user-transformed="true">
            <draw:text-box>
              <text:p>Graficul din stânga:</text:p>
              <text:p>- Chiar dacă costul per-token al Deepsek este mic, numărul de tokeni de ieșire este foarte ridicat.</text:p>
            </draw:text-box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Concluzii</text:p>
          </draw:text-box>
        </draw:frame>
        <draw:frame presentation:style-name="pr9" draw:text-style-name="P4" draw:layer="layout" svg:width="26cm" svg:height="10.5cm" svg:x="1cm" svg:y="4.125cm" presentation:class="outline">
          <draw:text-box>
            <text:list text:style-name="L2">
              <text:list-item>
                <text:p><text:span text:style-name="T3">Obiectiv</text:span><text:span text:style-name="T4">: nu un model câștigător, ci un </text:span><text:span text:style-name="T20">harness</text:span><text:span text:style-name="T4"> care face LLM-urile măsurabile;</text:span></text:p>
              </text:list-item>
              <text:list-item>
                <text:p><text:span text:style-name="T4">Două rezultate, de naturi diferite:</text:span></text:p>
                <text:list>
                  <text:list-item>
                    <text:p><text:span text:style-name="T4"><text:s/>Pozitiv-nuanțat: rezultatele descriu un LLM sub un anumit amestec de furnizori (rutarea OpenRouter), nu în absolut;</text:span></text:p>
                  </text:list-item>
                  <text:list-item>
                    <text:p><text:span text:style-name="T4"><text:s/>Aproape nul: disciplina JSON e prea uniformă (2 reîncercări, 0 eșecuri moale / 189 rulări) pentru a departaja LLM-urile;</text:span></text:p>
                  </text:list-item>
                </text:list>
              </text:list-item>
              <text:list-item>
                <text:p><text:span text:style-name="T3">Limitări</text:span><text:span text:style-name="T4">: rutare furnizori, 3 repetări (tendință, nu varianță), 7 anunțuri / o platformă, acuratețea agentului </text:span><text:span text:style-name="T7">pricer</text:span><text:span text:style-name="T4"> imposibil de evaluat;</text:span></text:p>
              </text:list-item>
              <text:list-item>
                <text:p><text:span text:style-name="T3">Direcții viitoare</text:span><text:span text:style-name="T4">: modele locale (axa cloud-vs-local), variația promptului, a doua platformă (Shopify), intrări mai dificile, evaluare reală a prețurilo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10" draw:text-style-name="P1" draw:layer="layout" svg:width="17cm" svg:height="14cm" svg:x="2cm" svg:y="13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modern" style:font-pitch="fixed"/>
    <style:font-face style:name="Fira Code Light" svg:font-family="'Fira Code Light'" style:font-pitch="fixed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1" svg:font-family="'Noto Sans'" style:font-family-generic="swiss"/>
    <style:font-face style:name="OpenSymbol" svg:font-family="OpenSymbol, 'Arial Unicode MS'" style:font-charset="x-symbol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ro" fo:country="RO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ibliography_20_1" style:display-name="Bibliography 1" style:family="graphic">
      <style:paragraph-properties fo:margin-left="0cm" fo:margin-right="0cm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Body_20_Text_20_Indent" style:display-name="Body Text Indent" style:family="graphic">
      <style:paragraph-properties fo:margin-left="0.88cm" fo:margin-right="0cm" fo:text-indent="0cm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Closing" style:family="graphic">
      <style:paragraph-properties fo:text-align="center" style:text-autospace="none"/>
      <style:text-properties fo:font-size="16pt" fo:font-weight="bold" style:font-size-asian="16pt" style:font-weight-asian="bold" style:font-size-complex="16pt" style:font-weight-complex="bold"/>
    </style:style>
    <style:style style:name="Comment" style:family="graphic">
      <style:paragraph-properties fo:margin-left="0.178cm" fo:margin-right="0.178cm" fo:margin-top="0.175cm" fo:margin-bottom="0cm" fo:line-height="100%" fo:text-indent="0cm" style:text-autospace="none"/>
      <style:text-properties style:use-window-font-color="true" loext:opacity="0%" fo:font-size="10pt" style:font-size-asian="10pt" style:font-size-complex="10pt"/>
    </style:style>
    <style:style style:name="Definition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Figure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Header_20_and_20_Footer" style:display-name="Header and Footer" style:family="graphic">
      <style:paragraph-properties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Noto Sans1" style:font-family-complex="'Noto Sans'" style:font-family-generic-complex="swiss"/>
    </style:style>
    <style:style style:name="Index_20_Link" style:display-name="Index Link" style:family="graphic">
      <style:paragraph-properties style:text-autospace="none"/>
    </style:style>
    <style:style style:name="List" style:family="graphic">
      <style:paragraph-properties style:text-autospace="none"/>
      <style:text-properties style:font-name-complex="Noto Sans1" style:font-family-complex="'Noto Sans'" style:font-family-generic-complex="swiss"/>
    </style:style>
    <style:style style:name="List_20_Bullet" style:display-name="List Bullet" style:family="graphic">
      <style:paragraph-properties fo:margin-left="1.12cm" fo:margin-right="0cm" fo:margin-top="0cm" fo:margin-bottom="0.374cm" fo:text-indent="-1.12cm" style:text-autospace="none"/>
    </style:style>
    <style:style style:name="List_20_Bullet_20_2" style:display-name="List Bullet 2" style:family="graphic">
      <style:paragraph-properties fo:margin-left="2.24cm" fo:margin-right="0cm" fo:margin-top="0cm" fo:margin-bottom="0.374cm" fo:text-indent="-1.12cm" style:text-autospace="none"/>
    </style:style>
    <style:style style:name="List_20_Contents" style:display-name="List Contents" style:family="graphic">
      <style:paragraph-properties fo:margin-left="0cm" fo:margin-right="0cm" fo:text-indent="0cm" style:text-autospace="none"/>
    </style:style>
    <style:style style:name="List_20_Continue" style:display-name="List Continue" style:family="graphic">
      <style:paragraph-properties fo:margin-left="1.12cm" fo:margin-right="0cm" fo:margin-top="0cm" fo:margin-bottom="0.374cm" fo:text-indent="0cm" style:text-autospace="none"/>
    </style:style>
    <style:style style:name="List_20_Number" style:display-name="List Number" style:family="graphic">
      <style:paragraph-properties fo:margin-left="1.12cm" fo:margin-right="0cm" fo:margin-top="0cm" fo:margin-bottom="0.374cm" fo:text-indent="-1.12cm" style:text-autospace="none"/>
    </style:style>
    <style:style style:name="Normal" style:family="graphic">
      <style:graphic-properties style:writing-mode="lr-tb"/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anguage="ro" fo:country="RO" style:letter-kerning="true" style:font-name-asian="Noto Sans CJK JP:palt" style:font-family-asian="'Noto Sans CJK JP:palt', 'Noto Sans CJK KR', 'Noto Sans CJK SC', 'Noto Sans CJK TC', 'Noto Sans CJK HK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ro" style:country-complex="RO"/>
    </style:style>
    <style:style style:name="Numbering_20_Symbols" style:display-name="Numbering Symbols" style:family="graphic">
      <style:paragraph-properties style:text-autospace="none"/>
    </style:style>
    <style:style style:name="Numbering_5f_20_5f_Symbols" style:display-name="Numbering_20_Symbols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TOC_20_Heading" style:display-name="TOC Heading" style:family="graphic">
      <style:paragraph-properties fo:margin-left="0cm" fo:margin-right="0cm" fo:text-indent="0cm" style:text-autospace="non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eletyp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Teza_20_Titlu_20_Capitol" style:display-name="Teza Titlu Capitol" style:family="graphic">
      <style:paragraph-properties fo:margin-top="0cm" fo:margin-bottom="0cm" fo:line-height="150%" fo:text-align="center" style:text-autospace="none"/>
      <style:text-properties fo:text-transform="uppercas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eza_20_Titlu_20_Paragraf" style:display-name="Teza Titlu Paragraf" style:family="graphic">
      <style:paragraph-properties fo:text-align="center" style:text-autospace="none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eza-cod" style:family="graphic">
      <style:paragraph-properties style:text-autospace="none"/>
      <style:text-properties style:font-name="Fira Code Light" fo:font-family="'Fira Code Light'" style:font-pitch="fixed" fo:font-size="12pt" fo:font-weight="normal" style:font-name-asian="Fira Code Light" style:font-family-asian="'Fira Code Light'" style:font-pitch-asian="fixed" style:font-size-asian="12pt" style:font-weight-asian="normal" style:font-name-complex="Fira Code Light" style:font-family-complex="'Fira Code Light'" style:font-pitch-complex="fixed" style:font-size-complex="12pt" style:font-weight-complex="normal"/>
    </style:style>
    <style:style style:name="Teza-lista" style:family="graphic">
      <style:paragraph-properties fo:text-align="justify" style:text-autospace="none"/>
    </style:style>
    <style:style style:name="Teza-paragraf" style:family="graphic">
      <style:paragraph-properties fo:margin-top="0cm" fo:margin-bottom="0.445cm" fo:line-height="150%" fo:text-align="justify" style:text-autospace="none"/>
    </style:style>
    <style:style style:name="Teza-paragraf-before-space" style:family="graphic">
      <style:paragraph-properties fo:margin-left="0cm" fo:margin-right="0cm" fo:margin-top="0.441cm" fo:margin-bottom="0.445cm" fo:text-indent="0cm" style:text-autospace="none"/>
    </style:style>
    <style:style style:name="Teza-paragraf-no-after-space" style:family="graphic">
      <style:paragraph-properties fo:margin-top="0cm" fo:margin-bottom="0cm" style:text-autospace="none"/>
    </style:style>
    <style:style style:name="User_20_Entry" style:display-name="User Entry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annotation_20_text" style:display-name="annotation text" style:family="graphic">
      <style:paragraph-properties fo:margin-left="7.057cm" fo:margin-right="0cm" fo:text-indent="0cm"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footer" style:family="graphic">
      <style:paragraph-properties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heading_20_1" style:display-name="heading 1" style:family="graphic">
      <style:paragraph-properties fo:margin-top="0.746cm" fo:margin-bottom="0.374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graphic">
      <style:paragraph-properties fo:margin-left="0cm" fo:margin-right="0cm" fo:text-indent="0cm" style:text-autospace="none"/>
      <style:text-properties fo:font-size="16pt" fo:font-weight="bold" style:font-size-asian="16pt" style:font-weight-asian="bold" style:font-size-complex="16pt" style:font-weight-complex="bold"/>
    </style:style>
    <style:style style:name="table_20_of_20_authorities" style:display-name="table of authorities" style:family="graphic">
      <style:paragraph-properties fo:margin-left="0cm" fo:margin-right="0cm" fo:text-indent="0cm" style:text-autospace="none"/>
      <style:text-properties fo:font-size="16pt" fo:font-weight="bold" style:font-size-asian="16pt" style:font-weight-asian="bold" style:font-size-complex="16pt" style:font-weight-complex="bold"/>
    </style:style>
    <style:style style:name="toc_20_1" style:display-name="toc 1" style:family="graphic">
      <style:paragraph-properties fo:margin-left="0cm" fo:margin-right="0cm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</style:style>
    <style:style style:name="toc_20_2" style:display-name="toc 2" style:family="graphic">
      <style:paragraph-properties fo:margin-left="0.88cm" fo:margin-right="0cm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lef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lef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lef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lef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lef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lef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lef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lef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lef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lef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lef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left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right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right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2T14:22:14.261923400</meta:creation-date>
    <dc:description>This work is licensed under a Creative Commons 0 License.
It makes use of the works of Jun NOGATA.</dc:description>
    <meta:generator>LibreOffice/26.2.4.2$Linux_X86_64 LibreOffice_project/0229ac93fcf0d7cbc6376066c6f35021cef002dc</meta:generator>
    <dc:title>Midnightblue</dc:title>
    <meta:editing-duration>PT33M30S</meta:editing-duration>
    <meta:editing-cycles>6</meta:editing-cycles>
    <dc:date>2026-06-13T12:32:24.438296357</dc:date>
    <meta:document-statistic meta:object-count="106"/>
  </office:meta>
</office:document-meta>
</file>